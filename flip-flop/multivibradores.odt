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900000261B7746F67.png" manifest:media-type="image/png"/>
  <manifest:file-entry manifest:full-path="Pictures/1000000000000185000000E833C80F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58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span text:style-name="T1">MULTIVIBRADORES</text:span></text:p>
      <text:p text:style-name="Preformatted_20_Text"><draw:frame draw:style-name="fr1" draw:name="Figura1" text:anchor-type="char" svg:x="-0.032cm" svg:y="0.185cm" svg:width="10.292cm" svg:height="6.138cm" draw:z-index="0"><draw:image xlink:href="Pictures/1000000000000185000000E833C80F3B.png" xlink:type="simple" xlink:show="embed" xlink:actuate="onLoad" draw:mime-type="image/png"/></draw:frame><draw:frame draw:style-name="fr1" draw:name="Figura2" text:anchor-type="char" svg:x="-0.199cm" svg:y="6.544cm" svg:width="10.312cm" svg:height="6.272cm" draw:z-index="1"><draw:image xlink:href="Pictures/10000000000003E900000261B7746F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7T19:42:04.260010654</dc:date>
    <meta:editing-duration>PT4M57S</meta:editing-duration>
    <meta:editing-cycles>1</meta:editing-cycles>
    <meta:document-statistic meta:table-count="0" meta:image-count="2" meta:object-count="0" meta:page-count="1" meta:paragraph-count="1" meta:word-count="1" meta:character-count="18" meta:non-whitespace-character-count="15"/>
    <meta:generator>LibreOffice/24.2.7.2$Linux_X86_64 LibreOffice_project/420$Build-2</meta:generator>
  </office:meta>
</office:document-meta>
</file>