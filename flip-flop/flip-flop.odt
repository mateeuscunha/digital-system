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F70000024FE988AD02.png" manifest:media-type="image/png"/>
  <manifest:file-entry manifest:full-path="Pictures/1000000000000186000000ECCA36D62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68add" officeooo:paragraph-rsid="00168add"/>
    </style:style>
    <style:style style:name="T1" style:family="text">
      <style:text-properties officeooo:rsid="00168ad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tab/><text:tab/><text:tab/><text:span text:style-name="T1">FLIP FLOP</text:span></text:p>
      <text:p text:style-name="P1"><draw:frame draw:style-name="fr1" draw:name="Figura1" text:anchor-type="char" svg:x="0.404cm" svg:y="0.37cm" svg:width="10.319cm" svg:height="6.244cm" draw:z-index="0"><draw:image xlink:href="Pictures/1000000000000186000000ECCA36D623.png" xlink:type="simple" xlink:show="embed" xlink:actuate="onLoad" draw:mime-type="image/png"/></draw:frame><draw:frame draw:style-name="fr1" draw:name="Figura2" text:anchor-type="char" svg:x="0.164cm" svg:y="7.444cm" svg:width="9.934cm" svg:height="5.784cm" draw:z-index="1"><draw:image xlink:href="Pictures/10000000000003F70000024FE988AD0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5-27T19:33:26.462418331</dc:date>
    <meta:editing-duration>PT10M9S</meta:editing-duration>
    <meta:editing-cycles>1</meta:editing-cycles>
    <meta:document-statistic meta:table-count="0" meta:image-count="2" meta:object-count="0" meta:page-count="1" meta:paragraph-count="1" meta:word-count="2" meta:character-count="12" meta:non-whitespace-character-count="8"/>
    <meta:generator>LibreOffice/24.2.7.2$Linux_X86_64 LibreOffice_project/420$Build-2</meta:generator>
  </office:meta>
</office:document-meta>
</file>