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2000000E93BDB8F0D.png" manifest:media-type="image/png"/>
  <manifest:file-entry manifest:full-path="Pictures/1000000000000183000000E3C061C3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ff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span text:style-name="T1">LATCH</text:span></text:p>
      <text:p text:style-name="Preformatted_20_Text"><draw:frame draw:style-name="fr1" draw:name="Figura1" text:anchor-type="char" svg:x="-0.111cm" svg:y="0.291cm" svg:width="10.239cm" svg:height="6.006cm" draw:z-index="0"><draw:image xlink:href="Pictures/1000000000000183000000E3C061C353.png" xlink:type="simple" xlink:show="embed" xlink:actuate="onLoad" draw:mime-type="image/png"/></draw:frame><draw:frame draw:style-name="fr1" draw:name="Figura2" text:anchor-type="char" svg:x="-0.111cm" svg:y="6.295cm" svg:width="10.213cm" svg:height="6.165cm" draw:z-index="1"><draw:image xlink:href="Pictures/1000000000000182000000E93BDB8F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7T19:49:23.450250209</dc:date>
    <meta:editing-duration>PT5M53S</meta:editing-duration>
    <meta:editing-cycles>1</meta:editing-cycles>
    <meta:document-statistic meta:table-count="0" meta:image-count="2" meta:object-count="0" meta:page-count="1" meta:paragraph-count="1" meta:word-count="1" meta:character-count="8" meta:non-whitespace-character-count="5"/>
    <meta:generator>LibreOffice/24.2.7.2$Linux_X86_64 LibreOffice_project/420$Build-2</meta:generator>
  </office:meta>
</office:document-meta>
</file>